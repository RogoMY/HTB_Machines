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EC00000128F44CD0FB.png" manifest:media-type="image/png"/>
  <manifest:file-entry manifest:full-path="Pictures/100000000000064B000000423D7705C4.png" manifest:media-type="image/png"/>
  <manifest:file-entry manifest:full-path="Pictures/100000000000070F00000115F132DF07.png" manifest:media-type="image/png"/>
  <manifest:file-entry manifest:full-path="Pictures/1000000000000485000000762E9888AD.png" manifest:media-type="image/png"/>
  <manifest:file-entry manifest:full-path="Pictures/100000000000070A0000007F3AE0E21D.png" manifest:media-type="image/png"/>
  <manifest:file-entry manifest:full-path="Pictures/10000000000002410000002A88F4168F.png" manifest:media-type="image/png"/>
  <manifest:file-entry manifest:full-path="Pictures/100000000000067C0000007E6946ACFB.png" manifest:media-type="image/png"/>
  <manifest:file-entry manifest:full-path="Pictures/100000000000068800000056593F93DD.png" manifest:media-type="image/png"/>
  <manifest:file-entry manifest:full-path="Pictures/10000000000003BB0000007B6AC2DCBE.png" manifest:media-type="image/png"/>
  <manifest:file-entry manifest:full-path="Pictures/100000000000062D000000844B116AA1.png" manifest:media-type="image/png"/>
  <manifest:file-entry manifest:full-path="Pictures/10000000000004E20000006E7C74DB01.png" manifest:media-type="image/png"/>
  <manifest:file-entry manifest:full-path="Pictures/10000000000009D80000052D7AF9FABE.png" manifest:media-type="image/png"/>
  <manifest:file-entry manifest:full-path="Pictures/1000000000000663000001CEE68BBA0D.png" manifest:media-type="image/png"/>
  <manifest:file-entry manifest:full-path="Pictures/1000000000000674000001D1AC77E4C6.png" manifest:media-type="image/png"/>
  <manifest:file-entry manifest:full-path="Pictures/10000000000006690000007FAAA236F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4a8a" officeooo:paragraph-rsid="000f4a8a"/>
    </style:style>
    <style:style style:name="P2" style:family="paragraph" style:parent-style-name="Standard">
      <style:text-properties officeooo:rsid="000f4a8a" officeooo:paragraph-rsid="000f4a8a" fo:background-color="#ffff00"/>
    </style:style>
    <style:style style:name="P3" style:family="paragraph" style:parent-style-name="Standard">
      <style:text-properties officeooo:rsid="000f4a8a" officeooo:paragraph-rsid="000f4a8a" fo:background-color="transparent"/>
    </style:style>
    <style:style style:name="P4" style:family="paragraph" style:parent-style-name="Standard">
      <style:text-properties officeooo:rsid="00103a4a" officeooo:paragraph-rsid="00103a4a" fo:background-color="transparent"/>
    </style:style>
    <style:style style:name="P5" style:family="paragraph" style:parent-style-name="Standard">
      <style:text-properties officeooo:rsid="00103a4a" officeooo:paragraph-rsid="00103a4a" fo:background-color="#ffff00"/>
    </style:style>
    <style:style style:name="P6" style:family="paragraph" style:parent-style-name="Standard">
      <style:text-properties officeooo:rsid="00114b1b" officeooo:paragraph-rsid="00114b1b" fo:background-color="transparent"/>
    </style:style>
    <style:style style:name="P7" style:family="paragraph" style:parent-style-name="Standard">
      <style:text-properties officeooo:rsid="00114b1b" officeooo:paragraph-rsid="00114b1b" fo:background-color="#ffff00"/>
    </style:style>
    <style:style style:name="P8" style:family="paragraph" style:parent-style-name="Standard">
      <style:text-properties officeooo:rsid="0011833d" officeooo:paragraph-rsid="0011833d" fo:background-color="transparent"/>
    </style:style>
    <style:style style:name="P9" style:family="paragraph" style:parent-style-name="Standard">
      <style:text-properties officeooo:rsid="0011833d" officeooo:paragraph-rsid="0011833d" fo:background-color="#ffff00"/>
    </style:style>
    <style:style style:name="P10" style:family="paragraph" style:parent-style-name="Standard">
      <style:text-properties officeooo:rsid="0011b069" officeooo:paragraph-rsid="0011b069" fo:background-color="transparent"/>
    </style:style>
    <style:style style:name="P11" style:family="paragraph" style:parent-style-name="Standard">
      <style:text-properties officeooo:rsid="00136e2e" officeooo:paragraph-rsid="00136e2e" fo:background-color="transparent"/>
    </style:style>
    <style:style style:name="P12" style:family="paragraph" style:parent-style-name="Standard">
      <style:text-properties officeooo:rsid="00136e2e" officeooo:paragraph-rsid="00136e2e" fo:background-color="#ffff00"/>
    </style:style>
    <style:style style:name="T1" style:family="text">
      <style:text-properties officeooo:rsid="00103a4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ntru aceasta masina de Windows, pasul unu e un nmap. Fiind de windows, de obicei nmap-ul simplu nu vede nimic, deci trebuie cu tagul -Pn .</text:p>
      <text:p text:style-name="P1"/>
      <text:p text:style-name="P2">rgmy@debian1:~$ nmap -Pn 10.129.29.79</text:p>
      <text:p text:style-name="P2">Starting Nmap 7.95 ( https://nmap.org ) at 2026-06-17 17:41 EEST</text:p>
      <text:p text:style-name="P2">Nmap scan report for 10.129.29.79</text:p>
      <text:p text:style-name="P2">Host is up (0.081s latency).</text:p>
      <text:p text:style-name="P2">Not shown: 988 filtered tcp ports (no-response)</text:p>
      <text:p text:style-name="P2">PORT <text:s text:c="4"/>STATE SERVICE</text:p>
      <text:p text:style-name="P2">53/tcp <text:s text:c="2"/>open <text:s/>domain</text:p>
      <text:p text:style-name="P2">88/tcp <text:s text:c="2"/>open <text:s/>kerberos-sec</text:p>
      <text:p text:style-name="P2">135/tcp <text:s/>open <text:s/>msrpc</text:p>
      <text:p text:style-name="P2">139/tcp <text:s/>open <text:s/>netbios-ssn</text:p>
      <text:p text:style-name="P2">389/tcp <text:s/>open <text:s/>ldap</text:p>
      <text:p text:style-name="P2">445/tcp <text:s/>open <text:s/>microsoft-ds</text:p>
      <text:p text:style-name="P2">464/tcp <text:s/>open <text:s/>kpasswd5</text:p>
      <text:p text:style-name="P2">593/tcp <text:s/>open <text:s/>http-rpc-epmap</text:p>
      <text:p text:style-name="P2">636/tcp <text:s/>open <text:s/>ldapssl</text:p>
      <text:p text:style-name="P2">3268/tcp open <text:s/>globalcatLDAP</text:p>
      <text:p text:style-name="P2">3269/tcp open <text:s/>globalcatLDAPssl</text:p>
      <text:p text:style-name="P2">5985/tcp open <text:s/>wsman</text:p>
      <text:p text:style-name="P1"/>
      <text:p text:style-name="P1"/>
      <text:p text:style-name="P1">Primul care sare in ochi e wsman (adica WinRM pt http 4986 e WinRM peste https) . Incercam sa ne conectam la el prin comanda:</text:p>
      <text:p text:style-name="P2">evil-winrm -i 10.129.29.79 -u 'alex.turner' -p 'Checkpoint2024!'</text:p>
      <text:p text:style-name="P1"/>
      <text:p text:style-name="P1"/>
      <text:p text:style-name="P1"><draw:frame draw:style-name="fr1" draw:name="Image1" text:anchor-type="char" svg:width="6.9252in" svg:height="1.6264in" draw:z-index="0"><draw:image xlink:href="Pictures/10000000000004EC00000128F44CD0FB.png" xlink:type="simple" xlink:show="embed" xlink:actuate="onLoad" draw:mime-type="image/png"/></draw:frame><text:s/></text:p>
      <text:p text:style-name="P1">Am mai incercat comenzi, ma primeste dar alex.turner nu are drept sa execute powershell la distanta.</text:p>
      <text:p text:style-name="P1"/>
      <text:p text:style-name="P1">Mergem mai departe. Este deschis portul 445, adica SMB. <text:s/>Sa vedem daca avem acces, si vedem ca exista.</text:p>
      <text:p text:style-name="P2">netexec smb 10.129.29.79 -u "alex.turner" -p "Checkpoint2024!"</text:p>
      <text:p text:style-name="P1"/>
      <text:p text:style-name="P1"><draw:frame draw:style-name="fr2" draw:name="Image2" text:anchor-type="char" svg:x="0.0693in" svg:y="0.0118in" svg:width="6.9252in" svg:height="0.2835in" draw:z-index="1"><draw:image xlink:href="Pictures/100000000000064B000000423D7705C4.png" xlink:type="simple" xlink:show="embed" xlink:actuate="onLoad" draw:mime-type="image/png"/></draw:frame><text:s/></text:p>
      <text:p text:style-name="P1">Sa luam niste date in plus. Poate avem drepturi sa executam niste fisiere.</text:p>
      <text:p text:style-name="P2">netexec smb 10.129.29.79 -u "alex.turner" -p "Checkpoint2024!" --shares</text:p>
      <text:p text:style-name="P2"/>
      <text:p text:style-name="P2"><text:soft-page-break/></text:p>
      <text:p text:style-name="P2"><draw:frame draw:style-name="fr2" draw:name="Image3" text:anchor-type="char" svg:x="-0.0362in" svg:y="0.1846in" svg:width="6.9252in" svg:height="1.061in" draw:z-index="2"><draw:image xlink:href="Pictures/100000000000070F00000115F132DF07.png" xlink:type="simple" xlink:show="embed" xlink:actuate="onLoad" draw:mime-type="image/png"/></draw:frame></text:p>
      <text:p text:style-name="P2"/>
      <text:p text:style-name="P3">Vedem ca nu avem decat drepuri de read.</text:p>
      <text:p text:style-name="P3"/>
      <text:p text:style-name="P3">Macar sa vedem ce useri exista.</text:p>
      <text:p text:style-name="P2">netexec smb 10.129.29.79 -u "alex.turner" -p "Checkpoint2024!" --users</text:p>
      <text:p text:style-name="P2"/>
      <text:p text:style-name="P3"><draw:frame draw:style-name="fr1" draw:name="Image4" text:anchor-type="char" svg:width="6.9252in" svg:height="1.9484in" draw:z-index="3"><draw:image xlink:href="Pictures/1000000000000674000001D1AC77E4C6.png" xlink:type="simple" xlink:show="embed" xlink:actuate="onLoad" draw:mime-type="image/png"/></draw:frame><text:s text:c="2"/></text:p>
      <text:p text:style-name="P3"><text:s/><text:span text:style-name="T1">Sa ne conectam prin smb, poate gasim ceva.</text:span></text:p>
      <text:p text:style-name="P2">smbclient //10.129.29.79/DevDrop -U "alex.turner" --password "Checkpoint2024!"</text:p>
      <text:p text:style-name="P2"/>
      <text:p text:style-name="P3"><draw:frame draw:style-name="fr3" draw:name="Image5" text:anchor-type="char" svg:width="6.9252in" svg:height="0.8917in" draw:z-index="4"><draw:image xlink:href="Pictures/10000000000003BB0000007B6AC2DCBE.png" xlink:type="simple" xlink:show="embed" xlink:actuate="onLoad" draw:mime-type="image/png"/></draw:frame><text:s/></text:p>
      <text:p text:style-name="P4">Fisierul e gol… Nu avem ce fisiere sa analizam. Sa mergem inapoi, poate vad ceva interesant.</text:p>
      <text:p text:style-name="P4"/>
      <text:p text:style-name="P5">SMB <text:s text:c="8"/>10.129.29.79 <text:s text:c="3"/>445 <text:s text:c="3"/>DC01 <text:s text:c="12"/>DevDrop <text:s text:c="8"/>READ <text:s text:c="18"/>VS Code extensions share for approved .vsix packages compatible with VS Code engine 1.118.0</text:p>
      <text:p text:style-name="P5"/>
      <text:p text:style-name="P4">In imaginea cu fisiere, vedem descrierea de mai sus. Poate trebuie sa adau eu o extensie de vscode.</text:p>
      <text:p text:style-name="P6">Am atasat in sectiunea Cod/ “extensia” scrisa in javascript pentru a incerca sa dau un reverse shell. Eu pe masina mea am sa stau cu netcat pe modul listen pe portul 80, poate capat ceva.</text:p>
      <text:p text:style-name="P7">sudo nc -lvnp 80</text:p>
      <text:p text:style-name="P7"/>
      <text:p text:style-name="P6"><draw:frame draw:style-name="fr2" draw:name="Image6" text:anchor-type="char" svg:x="-0.0882in" svg:y="0.339in" svg:width="6.9252in" svg:height="0.7063in" draw:z-index="5"><draw:image xlink:href="Pictures/1000000000000485000000762E9888AD.png" xlink:type="simple" xlink:show="embed" xlink:actuate="onLoad" draw:mime-type="image/png"/></draw:frame>Prima incercare nu a avut succes, primind access denied.</text:p>
      <text:p text:style-name="P6"><text:soft-page-break/>Poate nu am voie pe root sa pun, sa imi fac un fisier separat si poate pot sa o pun acolo.</text:p>
      <text:p text:style-name="P6"><draw:frame draw:style-name="fr4" draw:name="Image7" text:anchor-type="char" svg:width="6.0102in" svg:height="0.4374in" draw:z-index="6"><draw:image xlink:href="Pictures/10000000000002410000002A88F4168F.png" xlink:type="simple" xlink:show="embed" xlink:actuate="onLoad" draw:mime-type="image/png"/></draw:frame><text:s/></text:p>
      <text:p text:style-name="P6">Iar nici un succes.</text:p>
      <text:p text:style-name="P6"/>
      <text:p text:style-name="P8">Inapoi la cautare. Nu am verificat grupurile vreodata.</text:p>
      <text:p text:style-name="P9">netexec smb 10.129.29.79 -u "alex.turner" -p "Checkpoint2024!" --groups</text:p>
      <text:p text:style-name="P9"/>
      <text:p text:style-name="P8"><draw:frame draw:style-name="fr1" draw:name="Image8" text:anchor-type="char" svg:width="6.9252in" svg:height="0.6091in" draw:z-index="7"><draw:image xlink:href="Pictures/10000000000004E20000006E7C74DB01.png" xlink:type="simple" xlink:show="embed" xlink:actuate="onLoad" draw:mime-type="image/png"/></draw:frame><text:s/></text:p>
      <text:p text:style-name="P8">Am o senzatie ca nu ma uitam unde trebuie (REMOVED-ul de acolo (;_;) ). La LDAP cu mine.</text:p>
      <text:p text:style-name="P8"/>
      <text:p text:style-name="P9">netexec ldap 10.129.29.79 -u "alex.turner" -p "Checkpoint2024!" --groups</text:p>
      <text:p text:style-name="P9"/>
      <text:p text:style-name="P8">Poate am mai mult succes aici.</text:p>
      <text:p text:style-name="P8"/>
      <text:p text:style-name="P8"><draw:frame draw:style-name="fr5" draw:name="Image9" text:anchor-type="char" svg:width="6.9252in" svg:height="3.6409in" draw:z-index="8"><draw:image xlink:href="Pictures/10000000000009D80000052D7AF9FABE.png" xlink:type="simple" xlink:show="embed" xlink:actuate="onLoad" draw:mime-type="image/png"/></draw:frame><text:s/></text:p>
      <text:p text:style-name="P9">netexec ldap 10.129.29.79 -u "alex.turner" -p "Checkpoint2024!" --users</text:p>
      <text:p text:style-name="P8"><draw:frame draw:style-name="fr1" draw:name="Image10" text:anchor-type="char" svg:width="6.9252in" svg:height="1.9563in" draw:z-index="9"><draw:image xlink:href="Pictures/1000000000000663000001CEE68BBA0D.png" xlink:type="simple" xlink:show="embed" xlink:actuate="onLoad" draw:mime-type="image/png"/></draw:frame><text:soft-page-break/><text:s/></text:p>
      <text:p text:style-name="P9"/>
      <text:p text:style-name="P8">Acum, din grupuri, cele mai dubioase sunt cele de la capat. BackupAccess, IT-Staff, Finance-Staff, HR-Staff, Engineering-Staff, VPN-Users, DevTeam. Am sa ma uit la BackupAcess si la DevTeam. Ambele ar fi utile, mai ales DevTeam, ca sa pot sa pun “extensia”.</text:p>
      <text:p text:style-name="P8"/>
      <text:p text:style-name="P9">netexec ldap 10.129.29.79 -u "alex.turner" -p "Checkpoint2024!" --groups "BackupAccess"</text:p>
      <text:p text:style-name="P8"><draw:frame draw:style-name="fr1" draw:name="Image11" text:anchor-type="char" svg:width="6.9252in" svg:height="0.3555in" draw:z-index="10"><draw:image xlink:href="Pictures/100000000000068800000056593F93DD.png" xlink:type="simple" xlink:show="embed" xlink:actuate="onLoad" draw:mime-type="image/png"/></draw:frame><text:s/></text:p>
      <text:p text:style-name="P9">netexec ldap 10.129.29.79 -u "alex.turner" -p "Checkpoint2024!" --groups "DevTeam"</text:p>
      <text:p text:style-name="P8"><draw:frame draw:style-name="fr1" draw:name="Image12" text:anchor-type="char" svg:width="6.9252in" svg:height="0.5354in" draw:z-index="11"><draw:image xlink:href="Pictures/10000000000006690000007FAAA236FB.png" xlink:type="simple" xlink:show="embed" xlink:actuate="onLoad" draw:mime-type="image/png"/></draw:frame><text:s/></text:p>
      <text:p text:style-name="P10">Acum am facut o idee care vor fi noile targeturi. </text:p>
      <text:p text:style-name="P10"/>
      <text:p text:style-name="P11">Hai sa vedem ce putem afla despre fiecare in parte:<text:line-break/></text:p>
      <text:p text:style-name="P12">netexec ldap 10.129.29.79 -u "alex.turner" -p "Checkpoint2024!" --users "ryan.brooks"</text:p>
      <text:p text:style-name="P11"><draw:frame draw:style-name="fr1" draw:name="Image13" text:anchor-type="char" svg:width="6.9252in" svg:height="0.578in" draw:z-index="12"><draw:image xlink:href="Pictures/100000000000062D000000844B116AA1.png" xlink:type="simple" xlink:show="embed" xlink:actuate="onLoad" draw:mime-type="image/png"/></draw:frame><text:s/></text:p>
      <text:p text:style-name="P12">netexec ldap 10.129.29.79 -u "alex.turner" -p "Checkpoint2024!" --users "michael.torres"</text:p>
      <text:p text:style-name="P11"><draw:frame draw:style-name="fr1" draw:name="Image14" text:anchor-type="char" svg:width="6.9252in" svg:height="0.5252in" draw:z-index="13"><draw:image xlink:href="Pictures/100000000000067C0000007E6946ACFB.png" xlink:type="simple" xlink:show="embed" xlink:actuate="onLoad" draw:mime-type="image/png"/></draw:frame><text:s/></text:p>
      <text:p text:style-name="P12">netexec ldap 10.129.29.79 -u "alex.turner" -p "Checkpoint2024!" --users "brian.jenkins"</text:p>
      <text:p text:style-name="P11"><draw:frame draw:style-name="fr1" draw:name="Image15" text:anchor-type="char" svg:width="6.9252in" svg:height="0.4874in" draw:z-index="14"><draw:image xlink:href="Pictures/100000000000070A0000007F3AE0E21D.png" xlink:type="simple" xlink:show="embed" xlink:actuate="onLoad" draw:mime-type="image/png"/></draw:frame><text:s/>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7T17:40:39.866943810</meta:creation-date>
    <dc:date>2026-06-17T19:21:24.211119683</dc:date>
    <meta:editing-duration>PT15M57S</meta:editing-duration>
    <meta:editing-cycles>1</meta:editing-cycles>
    <meta:document-statistic meta:table-count="0" meta:image-count="15" meta:object-count="0" meta:page-count="4" meta:paragraph-count="66" meta:word-count="525" meta:character-count="3452" meta:non-whitespace-character-count="2894"/>
    <meta:generator>LibreOffice/25.2.3.2$Linux_X86_64 LibreOffice_project/520$Build-2</meta:generator>
  </office:meta>
</office:document-meta>
</file>