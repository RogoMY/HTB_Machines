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D000000694521030A.png" manifest:media-type="image/png"/>
  <manifest:file-entry manifest:full-path="Pictures/100000000000061D0000003FE03427B8.png" manifest:media-type="image/png"/>
  <manifest:file-entry manifest:full-path="Pictures/1000000000000433000001FF4962B270.png" manifest:media-type="image/png"/>
  <manifest:file-entry manifest:full-path="Pictures/100000000000035C0000019585747183.png" manifest:media-type="image/png"/>
  <manifest:file-entry manifest:full-path="Pictures/10000000000003CF000001E7C389F00A.png" manifest:media-type="image/png"/>
  <manifest:file-entry manifest:full-path="Pictures/100000000000011C0000007D7FE16BD5.png" manifest:media-type="image/png"/>
  <manifest:file-entry manifest:full-path="Pictures/100000000000062A000002501B6107AA.png" manifest:media-type="image/png"/>
  <manifest:file-entry manifest:full-path="Pictures/1000000000000372000000BF29FA4E40.png" manifest:media-type="image/png"/>
  <manifest:file-entry manifest:full-path="Pictures/10000000000003750000021D73E00E8D.png" manifest:media-type="image/png"/>
  <manifest:file-entry manifest:full-path="Pictures/10000000000009250000056FC695A39A.png" manifest:media-type="image/png"/>
  <manifest:file-entry manifest:full-path="Pictures/10000000000004D9000002812864C15D.png" manifest:media-type="image/png"/>
  <manifest:file-entry manifest:full-path="Pictures/10000000000009F20000017AB07E313B.png" manifest:media-type="image/png"/>
  <manifest:file-entry manifest:full-path="Pictures/10000000000005BA0000006CFA6BC1B5.png" manifest:media-type="image/png"/>
  <manifest:file-entry manifest:full-path="Pictures/100000000000022D00000075886350EA.png" manifest:media-type="image/png"/>
  <manifest:file-entry manifest:full-path="Pictures/10000000000002800000012C0D2303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69b" officeooo:paragraph-rsid="0003369b"/>
    </style:style>
    <style:style style:name="P2" style:family="paragraph" style:parent-style-name="Standard">
      <style:text-properties officeooo:rsid="00047798" officeooo:paragraph-rsid="00047798"/>
    </style:style>
    <style:style style:name="P3" style:family="paragraph" style:parent-style-name="Standard">
      <style:text-properties officeooo:rsid="00047798" officeooo:paragraph-rsid="00047798" fo:background-color="#ffff00"/>
    </style:style>
    <style:style style:name="P4" style:family="paragraph" style:parent-style-name="Standard">
      <style:text-properties officeooo:rsid="00047798" officeooo:paragraph-rsid="00047798" fo:background-color="transparent"/>
    </style:style>
    <style:style style:name="P5" style:family="paragraph" style:parent-style-name="Standard">
      <style:text-properties officeooo:rsid="00066976" officeooo:paragraph-rsid="00066976" fo:background-color="#ffff00"/>
    </style:style>
    <style:style style:name="P6" style:family="paragraph" style:parent-style-name="Standard">
      <style:text-properties officeooo:rsid="00066976" officeooo:paragraph-rsid="00066976" fo:background-color="transparent"/>
    </style:style>
    <style:style style:name="P7" style:family="paragraph" style:parent-style-name="Standard">
      <style:text-properties officeooo:paragraph-rsid="00066976"/>
    </style:style>
    <style:style style:name="P8" style:family="paragraph" style:parent-style-name="Standard">
      <style:text-properties officeooo:rsid="0007e3ff" officeooo:paragraph-rsid="0007e3ff" fo:background-color="transparent"/>
    </style:style>
    <style:style style:name="P9" style:family="paragraph" style:parent-style-name="Standard">
      <style:text-properties officeooo:rsid="000b0a08" officeooo:paragraph-rsid="000b0a08" fo:background-color="transparent"/>
    </style:style>
    <style:style style:name="P10" style:family="paragraph" style:parent-style-name="Standard">
      <style:text-properties officeooo:rsid="000b0a08" officeooo:paragraph-rsid="000b0a08" fo:background-color="#ffff00"/>
    </style:style>
    <style:style style:name="P11" style:family="paragraph" style:parent-style-name="Standard">
      <style:text-properties officeooo:rsid="000d0578" officeooo:paragraph-rsid="000d0578" fo:background-color="transparent"/>
    </style:style>
    <style:style style:name="P12" style:family="paragraph" style:parent-style-name="Standard">
      <style:text-properties officeooo:rsid="000d0578" officeooo:paragraph-rsid="000d0578" fo:background-color="#ffff00"/>
    </style:style>
    <style:style style:name="P13" style:family="paragraph" style:parent-style-name="Standard">
      <style:text-properties officeooo:rsid="000dd0c8" officeooo:paragraph-rsid="000dd0c8" fo:background-color="transparent"/>
    </style:style>
    <style:style style:name="P14" style:family="paragraph" style:parent-style-name="Standard">
      <style:text-properties officeooo:rsid="000dd0c8" officeooo:paragraph-rsid="000dd0c8" fo:background-color="#ffff00"/>
    </style:style>
    <style:style style:name="P15" style:family="paragraph" style:parent-style-name="Standard">
      <style:text-properties officeooo:rsid="000ee679" officeooo:paragraph-rsid="000ee679" fo:background-color="transparent"/>
    </style:style>
    <style:style style:name="P16" style:family="paragraph" style:parent-style-name="Standard">
      <style:text-properties officeooo:rsid="000ee679" officeooo:paragraph-rsid="000ee679" fo:background-color="#ffff0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66976"/>
    </style:style>
    <style:style style:name="T3" style:family="text">
      <style:text-properties officeooo:rsid="00066976" fo:background-color="transparent" loext:char-shading-value="0"/>
    </style:style>
    <style:style style:name="T4" style:family="text">
      <style:text-properties officeooo:rsid="000ee6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epem ca de obicei cu un nmap sa stim cu ce avem de a face.</text:p>
      <text:p text:style-name="P1"><draw:frame draw:style-name="fr1" draw:name="Image1" text:anchor-type="char" svg:width="6.9252in" svg:height="3.2917in" draw:z-index="0"><draw:image xlink:href="Pictures/1000000000000433000001FF4962B270.png" xlink:type="simple" xlink:show="embed" xlink:actuate="onLoad" draw:mime-type="image/png"/></draw:frame><text:s/></text:p>
      <text:p text:style-name="P1">Un site https, asta e rar. Si daca ne uitam, avem destul de multe filtered, deci am sa adaug flagul de -sC, poate primesc mai multe informatii.</text:p>
      <text:p text:style-name="P1"><draw:frame draw:style-name="fr1" draw:name="Image2" text:anchor-type="char" svg:width="6.9252in" svg:height="3.5764in" draw:z-index="1"><draw:image xlink:href="Pictures/10000000000004D9000002812864C15D.png" xlink:type="simple" xlink:show="embed" xlink:actuate="onLoad" draw:mime-type="image/png"/></draw:frame><text:s/></text:p>
      <text:p text:style-name="P1">Deja vedem ca o sa fim redirectionati la fireflow.htb, deci am sa il adaug deja in /etc/hosts.</text:p>
      <text:p text:style-name="P1"/>
      <text:p text:style-name="P1">Minunat, pe aceasta pagina, avem un buton care ne redirectioneaza pe flow.fireflow.htb, deci trebuie sa il adaugam si pe asta in /etc/hosts.</text:p>
      <text:p text:style-name="P1">Interesant, un AI. E posibil sa putem lua mai multe date dacat ar trebui cu ajutorul lui.</text:p>
      <text:p text:style-name="P1"/>
      <text:p text:style-name="P2">Bun, deci daca intram pe aceasta pagina, aflam ceva in plus.</text:p>
      <text:p text:style-name="P2"><draw:frame draw:style-name="fr2" draw:name="Image3" text:anchor-type="char" svg:x="0.2055in" svg:y="0.25in" svg:width="2.9583in" svg:height="1.302in" draw:z-index="2"><draw:image xlink:href="Pictures/100000000000011C0000007D7FE16BD5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, in combinatie cu ce scrie sub cadranul acestui model, aflam ceva interesant (E scris foarte marunt)</text:p>
      <text:p text:style-name="P3">Platform core: nominal Flow engine 1.8.2 MCP Tool Registry: online Telemetry: active NFAI-1: limited operation</text:p>
      <text:p text:style-name="P3"/>
      <text:p text:style-name="P4">Flow engine 1.8.2. Sa cautam pe net daca avem un CVE pentru Langflow 1.8.2, si evident, avem.</text:p>
      <text:p text:style-name="P4">CVE-2026-33017. Deci, hai sa incercam sa il folosim.</text:p>
      <text:p text:style-name="P5">curl -k https://flow.fireflow.htb/api/v1/auto_login</text:p>
      <text:p text:style-name="P5">{"detail":{"message":"Auto login is disabled.","auto_login":false}}<text:line-break/><text:span text:style-name="T1">Nu pare a fi vulnerabil de la acest CVE :(.</text:span></text:p>
      <text:p text:style-name="P4"><text:span text:style-name="T2">S</text:span>a vad ce avem pe aceasta pagina prin fuzzing.</text:p>
      <text:p text:style-name="P3">ffuf -u https://flow.fireflow.htb/FUZZ -w ~/wordlist/SecLists/Discovery/Web-Content/common.txt -fw 132</text:p>
      <text:p text:style-name="P4"><draw:frame draw:style-name="fr1" draw:name="Image4" text:anchor-type="char" svg:width="6.9252in" svg:height="2.598in" draw:z-index="3"><draw:image xlink:href="Pictures/100000000000062A000002501B6107AA.png" xlink:type="simple" xlink:show="embed" xlink:actuate="onLoad" draw:mime-type="image/png"/></draw:frame><text:s/></text:p>
      <text:p text:style-name="P4"/>
      <text:p text:style-name="P4">Ok, deci avem logs, dar trebuie sa ne autentificam, interesant.</text:p>
      <text:p text:style-name="P4"/>
      <text:p text:style-name="P6">Am gasit si cateva endpointuri pentru /api/v1</text:p>
      <text:p text:style-name="P6"><draw:frame draw:style-name="fr3" draw:name="Image5" text:anchor-type="char" svg:width="6.9252in" svg:height="4.2327in" draw:z-index="4"><draw:image xlink:href="Pictures/10000000000003750000021D73E00E8D.png" xlink:type="simple" xlink:show="embed" xlink:actuate="onLoad" draw:mime-type="image/png"/></draw:frame><text:soft-page-break/><text:s/></text:p>
      <text:p text:style-name="P6">Am citit iar pathul cand suntem redirectionati in flow.fireflow.htb.</text:p>
      <text:p text:style-name="P6"><text:a xlink:type="simple" xlink:href="https://flow.fireflow.htb/playground" text:style-name="Internet_20_link" text:visited-style-name="Visited_20_Internet_20_Link">https://flow.fireflow.htb/playground</text:a></text:p>
      <text:p text:style-name="P6"/>
      <text:p text:style-name="P7"><text:span text:style-name="T3">Acum, daca mai cautam deste Langflow 1.8.2, vedem alt CVE chiar interesant care in descriere suna ca si cum ar fi mai potrivit pentru aceasta masina </text:span><text:a xlink:type="simple" xlink:href="https://app.opencve.io/cve/CVE-2026-48519" text:style-name="Internet_20_link" text:visited-style-name="Visited_20_Internet_20_Link">CVE-2026-48519</text:a><text:span text:style-name="T3">.</text:span></text:p>
      <text:p text:style-name="P6"><text:a xlink:type="simple" xlink:href="https://github.com/advisories/GHSA-v5ff-9q35-q26f" text:style-name="Internet_20_link" text:visited-style-name="Visited_20_Internet_20_Link">https://github.com/advisories/GHSA-v5ff-9q35-q26f</text:a></text:p>
      <text:p text:style-name="P6"/>
      <text:p text:style-name="P8">Deschidem developer tools din browser si dam un mesaj. O sa vedem un post interesant spre</text:p>
      <text:p text:style-name="P8"><text:a xlink:type="simple" xlink:href="https://flow.fireflow.htb/api/v1/build_public_tmp/7d84d636-af65-42e4-ac38-26e867052c25/flow?start_component_id=ChatInput-608En&amp;log_builds=false&amp;event_delivery=streaming" text:style-name="Internet_20_link" text:visited-style-name="Visited_20_Internet_20_Link">https://flow.fireflow.htb/api/v1/build_public_tmp/7d84d636-af65-42e4-ac38-26e867052c25/flow?start_component_id=ChatInput-608En&amp;log_builds=false&amp;event_delivery=streaming</text:a></text:p>
      <text:p text:style-name="P8"/>
      <text:p text:style-name="P8">(ASTA E DOAR IN CAZUL MEU, ACEL GUID O SA VARIEZE DE LA PERSOANA LA ALTA)</text:p>
      <text:p text:style-name="P8"/>
      <text:p text:style-name="P9">Acum, sa testam o comanda sa vedem ca avem dreptul la remote code execution.</text:p>
      <text:p text:style-name="P9"/>
      <text:p text:style-name="P9"><draw:frame draw:style-name="fr1" draw:name="Image6" text:anchor-type="char" svg:width="6.9252in" svg:height="1.028in" draw:z-index="5"><draw:image xlink:href="Pictures/10000000000009F20000017AB07E313B.png" xlink:type="simple" xlink:show="embed" xlink:actuate="onLoad" draw:mime-type="image/png"/></draw:frame><text:s/></text:p>
      <text:p text:style-name="P9">Codul din json este doar un curl la ip-ul meu. Din cate vedem, am primit apelul.</text:p>
      <text:p text:style-name="P9"/>
      <text:p text:style-name="P9">Comanda sa facem acel code execution este aceasta:<text:line-break/></text:p>
      <text:p text:style-name="P10"><text:soft-page-break/>curl --insecure 'https://flow.fireflow.htb/api/v1/build_public_tmp/7d84d636-af65-42e4-ac38-26e867052c25/flow?start_component_id=ChatInput-608En&amp;log_builds=false&amp;event_delivery=streaming' -H 'Content-Type: application/json' -b 'client_id=21e8f518-4f20-4842-ab29-1b3d443294ab' --data-raw "$(cat test_with_python.json)"</text:p>
      <text:p text:style-name="P10"/>
      <text:p text:style-name="P11">Am modificat test_with_python.json astfel incat sa fac rost de un reverse shell.</text:p>
      <text:p text:style-name="P11"><draw:frame draw:style-name="fr1" draw:name="Image7" text:anchor-type="char" svg:width="6.9252in" svg:height="4.1146in" draw:z-index="6"><draw:image xlink:href="Pictures/10000000000009250000056FC695A39A.png" xlink:type="simple" xlink:show="embed" xlink:actuate="onLoad" draw:mime-type="image/png"/></draw:frame><text:s/></text:p>
      <text:p text:style-name="P11">Acum, sa luam mai multe privilegii/credentiale.</text:p>
      <text:p text:style-name="P11">Ne uitam in /etc/passwd sa vedem care va fi probabil victima.</text:p>
      <text:p text:style-name="P12">nightfall:x:1000:1000::/home/nightfall:/bin/bash</text:p>
      <text:p text:style-name="P12"/>
      <text:p text:style-name="P11">Asta pare cel mai interesant. ( pe langa root)</text:p>
      <text:p text:style-name="P11"/>
      <text:p text:style-name="P11">Acum, sa vedem daca ii gasim ceva date.</text:p>
      <text:p text:style-name="P11">In fisierul in care incepem vedem un fisier .db, sa vedem daca are ceva credentiale.</text:p>
      <text:p text:style-name="P13">Are dimensiunea 0, deci e o cauza pierduta, dar stim ca este o baza de date pentru langflow.</text:p>
      <text:p text:style-name="P13">Sa vedem daca sunt alte procese ce au langflow in nume.</text:p>
      <text:p text:style-name="P14">ps aux | grep langflow</text:p>
      <text:p text:style-name="P11"><draw:frame draw:style-name="fr1" draw:name="Image8" text:anchor-type="char" svg:width="6.9252in" svg:height="0.5098in" draw:z-index="7"><draw:image xlink:href="Pictures/10000000000005BA0000006CFA6BC1B5.png" xlink:type="simple" xlink:show="embed" xlink:actuate="onLoad" draw:mime-type="image/png"/></draw:frame><text:s/></text:p>
      <text:p text:style-name="P13">Ok, sunt cateva, sa le luam la rand sa vedem ce putem prelua din ele.</text:p>
      <text:p text:style-name="P14">cat /proc/1527/environ | tr '\0' '\n'</text:p>
      <text:p text:style-name="P14"/>
      <text:p text:style-name="P13"><draw:frame draw:style-name="fr3" draw:name="Image9" text:anchor-type="char" svg:width="6.9252in" svg:height="3.261in" draw:z-index="8"><draw:image xlink:href="Pictures/100000000000035C0000019585747183.png" xlink:type="simple" xlink:show="embed" xlink:actuate="onLoad" draw:mime-type="image/png"/></draw:frame><text:soft-page-break/><text:s/></text:p>
      <text:p text:style-name="P13">o parola scrisa acolo pentru superuser</text:p>
      <text:p text:style-name="P14">n1ghtm4r3_b4_n1ghtf4ll</text:p>
      <text:p text:style-name="P14"/>
      <text:p text:style-name="P13">Interesant nume, poate e si parola la nightfall, avand in vedere ca apare in parola.</text:p>
      <text:p text:style-name="P13">A MERS.</text:p>
      <text:p text:style-name="P13"><draw:frame draw:style-name="fr4" draw:name="Image10" text:anchor-type="char" svg:width="5.802in" svg:height="1.2189in" draw:z-index="9"><draw:image xlink:href="Pictures/100000000000022D00000075886350EA.png" xlink:type="simple" xlink:show="embed" xlink:actuate="onLoad" draw:mime-type="image/png"/></draw:frame>Acum, sa nu mai stau pe instanta asta pe care o am printr-un reverse shell. Pot sa ma conectez direct prin ssh.</text:p>
      <text:p text:style-name="P13">nightfall n1ghtm4r3_b4_n1ghtf4ll</text:p>
      <text:p text:style-name="P13"/>
      <text:p text:style-name="P13">Am luat flagul din home, acum sa vedem cum putem deveni root.</text:p>
      <text:p text:style-name="P13"/>
      <text:p text:style-name="P14">find / -perm -4000 -type f 2&gt;/dev/null</text:p>
      <text:p text:style-name="P13"><draw:frame draw:style-name="fr4" draw:name="Image11" text:anchor-type="char" svg:width="6.6665in" svg:height="3.1252in" draw:z-index="10"><draw:image xlink:href="Pictures/10000000000002800000012C0D230379.png" xlink:type="simple" xlink:show="embed" xlink:actuate="onLoad" draw:mime-type="image/png"/></draw:frame><text:soft-page-break/><text:s/></text:p>
      <text:p text:style-name="P13">Nimic executabil ca root ce as putea folosi. (Daca era un python ar fi fost foarte usor).</text:p>
      <text:p text:style-name="P13">Sa vad daca am undeva unde pot scrie si sa pot sa devin root intr-un fel.</text:p>
      <text:p text:style-name="P14">find / -writable -type f 2&gt;/dev/null | grep -v "/proc/" | grep -v "/sys/"</text:p>
      <text:p text:style-name="P13"><draw:frame draw:style-name="fr1" draw:name="Image12" text:anchor-type="char" svg:width="6.9252in" svg:height="1.4992in" draw:z-index="11"><draw:image xlink:href="Pictures/1000000000000372000000BF29FA4E40.png" xlink:type="simple" xlink:show="embed" xlink:actuate="onLoad" draw:mime-type="image/png"/></draw:frame><text:s/></text:p>
      <text:p text:style-name="P13">.<text:span text:style-name="T4">mcp/config.json pare interesant.</text:span></text:p>
      <text:p text:style-name="P15">Dar sa vad ce servicii am pe fundal in general.</text:p>
      <text:p text:style-name="P16">netstat -tulnp</text:p>
      <text:p text:style-name="P13"/>
      <text:p text:style-name="P13"><draw:frame draw:style-name="fr1" draw:name="Image13" text:anchor-type="char" svg:width="6.9252in" svg:height="3.4583in" draw:z-index="12"><draw:image xlink:href="Pictures/10000000000003CF000001E7C389F00A.png" xlink:type="simple" xlink:show="embed" xlink:actuate="onLoad" draw:mime-type="image/png"/></draw:frame><text:soft-page-break/><text:s/></text:p>
      <text:p text:style-name="P15">Astea par sa fei porturi default folosite de kubernetes.</text:p>
      <text:p text:style-name="P15">Poate am dreptul sa fac mai multe cu ajutorul la kubernetes.</text:p>
      <text:p text:style-name="P16"><text:s/>kubectl get nodes</text:p>
      <text:p text:style-name="P15"><draw:frame draw:style-name="fr1" draw:name="Image14" text:anchor-type="char" svg:width="6.9252in" svg:height="0.2783in" draw:z-index="13"><draw:image xlink:href="Pictures/100000000000061D0000003FE03427B8.png" xlink:type="simple" xlink:show="embed" xlink:actuate="onLoad" draw:mime-type="image/png"/></draw:frame><text:s/></text:p>
      <text:p text:style-name="P15">Nu am drepturi.</text:p>
      <text:p text:style-name="P15">Fisierul k3 pare sa fie foarte detinut de root, asta explica multe.</text:p>
      <text:p text:style-name="P15"><draw:frame draw:style-name="fr1" draw:name="Image15" text:anchor-type="char" svg:width="6.9252in" svg:height="1.061in" draw:z-index="14"><draw:image xlink:href="Pictures/10000000000002AD000000694521030A.png" xlink:type="simple" xlink:show="embed" xlink:actuate="onLoad" draw:mime-type="image/png"/></draw:frame><text:s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20:03:32.459849835</meta:creation-date>
    <dc:date>2026-06-29T23:21:16.939078644</dc:date>
    <meta:editing-duration>PT18M23S</meta:editing-duration>
    <meta:editing-cycles>1</meta:editing-cycles>
    <meta:document-statistic meta:table-count="0" meta:image-count="15" meta:object-count="0" meta:page-count="7" meta:paragraph-count="72" meta:word-count="622" meta:character-count="4165" meta:non-whitespace-character-count="3587"/>
    <meta:generator>LibreOffice/25.2.3.2$Linux_X86_64 LibreOffice_project/520$Build-2</meta:generator>
  </office:meta>
</office:document-meta>
</file>